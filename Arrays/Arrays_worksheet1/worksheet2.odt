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bkmrk-arrays-worksheet%3A-qu"/>Questions 26 - 50</text:h>
      <text:h text:style-name="Heading_20_5" text:outline-level="5"><text:bookmark text:name="bkmrk-26.-find-the-union-o"/>26. Find the union of two arrays</text:h>
      <text:section text:style-name="Sect1" text:name="bkmrk-question-description">
        <text:p text:style-name="P1">Question description:</text:p>
        <text:p text:style-name="P1">Write a C program to find the union of two arrays (all unique elements from both arrays).</text:p>
        <text:p text:style-name="P1">Sample data:</text:p>
        <text:p text:style-name="P1">Array 1: 1 2 3 4 Array 2: 3 4 5 6</text:p>
        <text:p text:style-name="P1">Expected output:</text:p>
        <text:p text:style-name="P1">Union: 1 2 3 4 5 6</text:p>
      </text:section>
      <text:h text:style-name="Heading_20_5" text:outline-level="5"><text:bookmark text:name="bkmrk-27.-find-the-interse"/>27. Find the intersection of two arrays</text:h>
      <text:section text:style-name="Sect1" text:name="bkmrk-question-description-1">
        <text:p text:style-name="P1">Question description:</text:p>
        <text:p text:style-name="P1">Write a C program to find the intersection of two arrays (common elements).</text:p>
        <text:p text:style-name="P1">Sample data:</text:p>
        <text:p text:style-name="P1">Array 1: 1 2 3 4 Array 2: 3 4 5 6</text:p>
        <text:p text:style-name="P1">Expected output:</text:p>
        <text:p text:style-name="P1">Intersection: 3 4</text:p>
      </text:section>
      <text:h text:style-name="Heading_20_5" text:outline-level="5"><text:bookmark text:name="bkmrk-28.-find-the-differe"/>28. Find the difference of two arrays</text:h>
      <text:section text:style-name="Sect1" text:name="bkmrk-question-description-2">
        <text:p text:style-name="P1">Question description:</text:p>
        <text:p text:style-name="P1">Write a C program to find the difference of two arrays (elements present in first array but not in second).</text:p>
        <text:p text:style-name="P1">Sample data:</text:p>
        <text:p text:style-name="P1">Array 1: 1 2 3 4 Array 2: 3 4 5 6</text:p>
        <text:p text:style-name="P1">Expected output:</text:p>
        <text:p text:style-name="P1">Difference (Array1 - Array2): 1 2</text:p>
      </text:section>
      <text:h text:style-name="Heading_20_5" text:outline-level="5"><text:bookmark text:name="bkmrk-29.-check-if-array-i"/>29. Check if array is palindrome</text:h>
      <text:section text:style-name="Sect1" text:name="bkmrk-question-description-3">
        <text:p text:style-name="P1">Question description:</text:p>
        <text:p text:style-name="P1">Write a C program to check whether an array is palindrome (reads the same forward and backward).</text:p>
        <text:p text:style-name="P1">Sample data:</text:p>
        <text:p text:style-name="P1">Input: 1 2 3 2 1</text:p>
        <text:p text:style-name="P1">Expected output:</text:p>
        <text:p text:style-name="P1">The array is a palindrome.</text:p>
      </text:section>
      <text:h text:style-name="Heading_20_5" text:outline-level="5"><text:bookmark text:name="bkmrk-30.-count-pairs-with"/>30. Count pairs with given sum</text:h>
      <text:section text:style-name="Sect1" text:name="bkmrk-question-description-4">
        <text:p text:style-name="P1">Question description:</text:p>
        <text:p text:style-name="P1">Write a C program to find number of pairs in the array whose sum is equal to a given value.</text:p>
        <text:p text:style-name="P1">Sample data:</text:p>
        <text:p text:style-name="P1">Input array: 1 5 7 -1 5 Sum = 6</text:p>
        <text:p text:style-name="P1">Expected output:</text:p>
        <text:p text:style-name="P1">Number of pairs: 3</text:p>
      </text:section>
      <text:h text:style-name="Heading_20_5" text:outline-level="5"><text:bookmark text:name="bkmrk-31.-find-missing-num"/>31. Find missing number in array</text:h>
      <text:section text:style-name="Sect1" text:name="bkmrk-question-description-5">
        <text:p text:style-name="P1">Question description:</text:p>
        <text:p text:style-name="P1">Write a C program to find the missing number in an array of size n containing numbers from 1 to n+1.</text:p>
        <text:p text:style-name="P1">Sample data:</text:p>
        <text:p text:style-name="P1">Input: 1 2 4 5 6</text:p>
        <text:p text:style-name="P1"><text:soft-page-break/>Expected output:</text:p>
        <text:p text:style-name="P1">Missing number is: 3</text:p>
      </text:section>
      <text:h text:style-name="Heading_20_5" text:outline-level="5"><text:bookmark text:name="bkmrk-32.-find-the-majorit"/>32. Find the majority element</text:h>
      <text:section text:style-name="Sect1" text:name="bkmrk-question-description-6">
        <text:p text:style-name="P1">Question description:</text:p>
        <text:p text:style-name="P1">Write a C program to find the majority element in an array (element appearing more than n/2 times).</text:p>
        <text:p text:style-name="P1">Sample data:</text:p>
        <text:p text:style-name="P1">Input: 2 2 1 2 3 2 2</text:p>
        <text:p text:style-name="P1">Expected output:</text:p>
        <text:p text:style-name="P1">Majority element: 2</text:p>
      </text:section>
      <text:h text:style-name="Heading_20_5" text:outline-level="5"><text:bookmark text:name="bkmrk-33.-find-subarray-wi"/>33. Find subarray with maximum sum (Kadane’s Algorithm)</text:h>
      <text:section text:style-name="Sect1" text:name="bkmrk-question-description-7">
        <text:p text:style-name="P1">Question description:</text:p>
        <text:p text:style-name="P1">Write a C program to find the maximum sum of a contiguous subarray.</text:p>
        <text:p text:style-name="P1">Sample data:</text:p>
        <text:p text:style-name="P1">Input: -2 -3 4 -1 -2 1 5 -3</text:p>
        <text:p text:style-name="P1">Expected output:</text:p>
        <text:p text:style-name="P1">Maximum contiguous sum is 7</text:p>
      </text:section>
      <text:h text:style-name="Heading_20_5" text:outline-level="5"><text:bookmark text:name="bkmrk-34.-find-leader-elem"/>34. Find leader elements in array</text:h>
      <text:section text:style-name="Sect1" text:name="bkmrk-question-description-8">
        <text:p text:style-name="P1">Question description:</text:p>
        <text:p text:style-name="P1">Write a C program to find all leader elements in the array (elements greater than all elements to their right).</text:p>
        <text:p text:style-name="P1">Sample data:</text:p>
        <text:p text:style-name="P1">Input: 16 17 4 3 5 2</text:p>
        <text:p text:style-name="P1">Expected output:</text:p>
        <text:p text:style-name="P1">Leader elements: 17 5 2</text:p>
      </text:section>
      <text:h text:style-name="Heading_20_5" text:outline-level="5"><text:bookmark text:name="bkmrk-35.-find-equilibrium"/>35. Find equilibrium index</text:h>
      <text:section text:style-name="Sect1" text:name="bkmrk-question-description-9">
        <text:p text:style-name="P1">Question description:</text:p>
        <text:p text:style-name="P1">Write a C program to find the index where the sum of elements to the left is equal to the sum to the right.</text:p>
        <text:p text:style-name="P1">Sample data:</text:p>
        <text:p text:style-name="P1">Input: -7 1 5 2 -4 3 0</text:p>
        <text:p text:style-name="P1">Expected output:</text:p>
        <text:p text:style-name="P1">Equilibrium index is 3</text:p>
      </text:section>
      <text:h text:style-name="Heading_20_5" text:outline-level="5"><text:bookmark text:name="bkmrk-36.-find-second-smal"/>36. Find second smallest element</text:h>
      <text:section text:style-name="Sect1" text:name="bkmrk-question-description-10">
        <text:p text:style-name="P1">Question description:</text:p>
        <text:p text:style-name="P1">Write a C program to find the second smallest element in the array.</text:p>
        <text:p text:style-name="P1">Sample data:</text:p>
        <text:p text:style-name="P1">Input: 12 13 1 10 34 1</text:p>
        <text:p text:style-name="P1">Expected output:</text:p>
        <text:p text:style-name="P1">Second smallest element is 10</text:p>
      </text:section>
      <text:h text:style-name="Heading_20_5" text:outline-level="5"><text:bookmark text:name="bkmrk-37.-check-if-array-i"/>37. Check if array is subset of another</text:h>
      <text:section text:style-name="Sect1" text:name="bkmrk-question-description-11">
        <text:p text:style-name="P1">Question description:</text:p>
        <text:p text:style-name="P1">Write a C program to check if one array is a subset of another array.</text:p>
        <text:p text:style-name="P1">Sample data:</text:p>
        <text:p text:style-name="P1"><text:soft-page-break/>Array 1: 1 2 3 4 5 Array 2: 2 4 5</text:p>
        <text:p text:style-name="P1">Expected output:</text:p>
        <text:p text:style-name="P1">Array2 is a subset of Array1</text:p>
      </text:section>
      <text:h text:style-name="Heading_20_5" text:outline-level="5"><text:bookmark text:name="bkmrk-38.-sort-array-of-0s"/>38. Sort array of 0s, 1s and 2s</text:h>
      <text:section text:style-name="Sect1" text:name="bkmrk-question-description-12">
        <text:p text:style-name="P1">Question description:</text:p>
        <text:p text:style-name="P1">Write a C program to sort an array consisting of only 0s, 1s, and 2s.</text:p>
        <text:p text:style-name="P1">Sample data:</text:p>
        <text:p text:style-name="P1">Input: 0 1 2 0 1 2 1 0</text:p>
        <text:p text:style-name="P1">Expected output:</text:p>
        <text:p text:style-name="P1">Sorted array: 0 0 0 1 1 1 2 2</text:p>
      </text:section>
      <text:h text:style-name="Heading_20_5" text:outline-level="5"><text:bookmark text:name="bkmrk-39.-find-product-of-"/>39. Find product of all elements</text:h>
      <text:section text:style-name="Sect1" text:name="bkmrk-question-description-13">
        <text:p text:style-name="P1">Question description:</text:p>
        <text:p text:style-name="P1">Write a C program to find the product of all elements in the array.</text:p>
        <text:p text:style-name="P1">Sample data:</text:p>
        <text:p text:style-name="P1">Input: 1 2 3 4</text:p>
        <text:p text:style-name="P1">Expected output:</text:p>
        <text:p text:style-name="P1">Product: 24</text:p>
      </text:section>
      <text:h text:style-name="Heading_20_5" text:outline-level="5"><text:bookmark text:name="bkmrk-40.-find-the-maximum"/>40. Find the maximum difference between two elements such that larger element appears after the smaller</text:h>
      <text:section text:style-name="Sect1" text:name="bkmrk-question-description-14">
        <text:p text:style-name="P1">Question description:</text:p>
        <text:p text:style-name="P1">Write a C program to find the maximum difference between two elements in an array such that the larger element appears after the smaller element.</text:p>
        <text:p text:style-name="P1">Sample data:</text:p>
        <text:p text:style-name="P1">Input: 2 3 10 6 4 8 1</text:p>
        <text:p text:style-name="P1">Expected output:</text:p>
        <text:p text:style-name="P1">Maximum difference: 8 (10 - 2)</text:p>
      </text:section>
      <text:h text:style-name="Heading_20_5" text:outline-level="5"><text:bookmark text:name="bkmrk-41.-find-the-minimum"/>41. Find the minimum and maximum element using minimum comparisons</text:h>
      <text:section text:style-name="Sect1" text:name="bkmrk-question-description-15">
        <text:p text:style-name="P1">Question description:</text:p>
        <text:p text:style-name="P1">Write a C program to find minimum and maximum elements using minimum number of comparisons.</text:p>
        <text:p text:style-name="P1">Sample data:</text:p>
        <text:p text:style-name="P1">Input: 1000 11 445 1 330 3000</text:p>
        <text:p text:style-name="P1">Expected output:</text:p>
        <text:p text:style-name="P1">Minimum element is 1 Maximum element is 3000</text:p>
      </text:section>
      <text:h text:style-name="Heading_20_5" text:outline-level="5"><text:bookmark text:name="bkmrk-42.-count-occurrence"/>42. Count occurrences of a number</text:h>
      <text:section text:style-name="Sect1" text:name="bkmrk-question-description-16">
        <text:p text:style-name="P1">Question description:</text:p>
        <text:p text:style-name="P1">Write a C program to count how many times a specific number appears in an array.</text:p>
        <text:p text:style-name="P1">Sample data:</text:p>
        <text:p text:style-name="P1">Input array: 1 2 3 2 2 5 Number to count: 2</text:p>
        <text:p text:style-name="P1">Expected output:</text:p>
        <text:p text:style-name="P1">Number 2 occurs 3 times</text:p>
      </text:section>
      <text:h text:style-name="Heading_20_5" text:outline-level="5"><text:bookmark text:name="bkmrk-43.-find-two-element"/>43. Find two elements whose sum is closest to zero</text:h>
      <text:section text:style-name="Sect1" text:name="bkmrk-question-description-17">
        <text:p text:style-name="P1">Question description:</text:p>
        <text:p text:style-name="P1">Write a C program to find two elements whose sum is closest to zero.</text:p>
        <text:p text:style-name="P1">Sample data:</text:p>
        <text:p text:style-name="P1"><text:soft-page-break/>Input: 1 60 -10 70 -80 85</text:p>
        <text:p text:style-name="P1">Expected output:</text:p>
        <text:p text:style-name="P1">Pair whose sum is closest to zero: -80 85</text:p>
      </text:section>
      <text:h text:style-name="Heading_20_5" text:outline-level="5"><text:bookmark text:name="bkmrk-44.-rearrange-positi"/>44. Rearrange positive and negative numbers</text:h>
      <text:section text:style-name="Sect1" text:name="bkmrk-question-description-18">
        <text:p text:style-name="P1">Question description:</text:p>
        <text:p text:style-name="P1">Write a C program to rearrange an array so that positive and negative numbers are placed alternatively.</text:p>
        <text:p text:style-name="P1">Sample data:</text:p>
        <text:p text:style-name="P1">Input: 1 2 3 -4 -1 4</text:p>
        <text:p text:style-name="P1">Expected output:</text:p>
        <text:p text:style-name="P1">Rearranged array: -4 1 -1 2 3 4</text:p>
      </text:section>
      <text:h text:style-name="Heading_20_5" text:outline-level="5"><text:bookmark text:name="bkmrk-45.-move-all-zeros-t"/>45. Move all zeros to end of array</text:h>
      <text:section text:style-name="Sect1" text:name="bkmrk-question-description-19">
        <text:p text:style-name="P1">Question description:</text:p>
        <text:p text:style-name="P1">Write a C program to move all zeros in the array to the end while maintaining the order of non-zero elements.</text:p>
        <text:p text:style-name="P1">Sample data:</text:p>
        <text:p text:style-name="P1">Input: 1 0 2 0 0 3 4</text:p>
        <text:p text:style-name="P1">Expected output:</text:p>
        <text:p text:style-name="P1">Output: 1 2 3 4 0 0 0</text:p>
      </text:section>
      <text:h text:style-name="Heading_20_5" text:outline-level="5"><text:bookmark text:name="bkmrk-46.-find-the-frequen"/>46. Find the frequency of each element</text:h>
      <text:section text:style-name="Sect1" text:name="bkmrk-question-description-20">
        <text:p text:style-name="P1">Question description:</text:p>
        <text:p text:style-name="P1">Write a C program to find the frequency of each element in the array.</text:p>
        <text:p text:style-name="P1">Sample data:</text:p>
        <text:p text:style-name="P1">Input: 10 20 10 30 20 20 10 10</text:p>
        <text:p text:style-name="P1">Expected output:</text:p>
        <text:p text:style-name="P1">10: 4 20: 3 30: 1</text:p>
      </text:section>
      <text:h text:style-name="Heading_20_5" text:outline-level="5"><text:bookmark text:name="bkmrk-47.-find-maximum-sum"/>47. Find maximum sum of k consecutive elements</text:h>
      <text:section text:style-name="Sect1" text:name="bkmrk-question-description-21">
        <text:p text:style-name="P1">Question description:</text:p>
        <text:p text:style-name="P1">Write a C program to find maximum sum of k consecutive elements in an array.</text:p>
        <text:p text:style-name="P1">Sample data:</text:p>
        <text:p text:style-name="P1">Input: 2 3 4 1 5 6 7 k = 3</text:p>
        <text:p text:style-name="P1">Expected output:</text:p>
        <text:p text:style-name="P1">Maximum sum of 3 consecutive elements: 18</text:p>
      </text:section>
      <text:h text:style-name="Heading_20_5" text:outline-level="5"><text:bookmark text:name="bkmrk-48.-rotate-array-by-"/>48. Rotate array by k positions</text:h>
      <text:section text:style-name="Sect1" text:name="bkmrk-question-description-22">
        <text:p text:style-name="P1">Question description:</text:p>
        <text:p text:style-name="P1">Write a C program to rotate the elements of an array by k positions to the right.</text:p>
        <text:p text:style-name="P1">Sample data:</text:p>
        <text:p text:style-name="P1">Input: 1 2 3 4 5 k = 2</text:p>
        <text:p text:style-name="P1">Expected output:</text:p>
        <text:p text:style-name="P1">Output: 4 5 1 2 3</text:p>
      </text:section>
      <text:h text:style-name="Heading_20_5" text:outline-level="5"><text:bookmark text:name="bkmrk-49.-find-longest-con"/>49. Find longest consecutive sequence</text:h>
      <text:section text:style-name="Sect1" text:name="bkmrk-question-description-23">
        <text:p text:style-name="P1">Question description:</text:p>
        <text:p text:style-name="P1">Write a C program to find the length of the longest consecutive elements sequence.</text:p>
        <text:p text:style-name="P1">Sample data:</text:p>
        <text:p text:style-name="P1"><text:soft-page-break/>Input: 100 4 200 1 3 2</text:p>
        <text:p text:style-name="P1">Expected output:</text:p>
        <text:p text:style-name="P1">Longest consecutive sequence length: 4 (1, 2, 3, 4)</text:p>
      </text:section>
      <text:h text:style-name="Heading_20_5" text:outline-level="5"><text:bookmark text:name="bkmrk-50.-find-the-missing"/>50. Find the missing two numbers in an array</text:h>
      <text:section text:style-name="Sect1" text:name="bkmrk-question-description-24">
        <text:p text:style-name="P1">Question description:</text:p>
        <text:p text:style-name="P1">Write a C program to find two missing numbers from an array containing numbers from 1 to n+2.</text:p>
        <text:p text:style-name="P1">Sample data:</text:p>
        <text:p text:style-name="P1">Input: 1 2 4 6</text:p>
        <text:p text:style-name="P1">Expected output:</text:p>
        <text:p text:style-name="P1">Missing numbers: 3 5</text:p>
      </text:section>
      <text:p text:style-name="P1"><text:a xlink:type="simple" xlink:href="http://192.168.1.101/books/01-arrays/page/worksheet-1" text:style-name="Internet_20_link" text:visited-style-name="Visited_20_Internet_20_Link">Previous</text:a></text:p>
      <text:p text:style-name="P1"><text:a xlink:type="simple" xlink:href="http://192.168.1.101/books/01-arrays/page/worksheet-1" text:style-name="Internet_20_link" text:visited-style-name="Visited_20_Internet_20_Link">Worksheet 1 </text:a></text:p>
      <text:p text:style-name="P1"><text:a xlink:type="simple" xlink:href="http://192.168.1.101/books/01-arrays/page/challenges" text:style-name="Internet_20_link" text:visited-style-name="Visited_20_Internet_20_Link">Next</text:a></text:p>
      <text:section text:style-name="Sect1" text:name="sibling-navigation">
        <text:p text:style-name="P1"><text:a xlink:type="simple" xlink:href="http://192.168.1.101/books/01-arrays/page/challenges" text:style-name="Internet_20_link" text:visited-style-name="Visited_20_Internet_20_Link">Challenges </text:a></text:p>
      </text:section>
      <text:p text:style-name="Horizontal_20_Line"/>
      <text:h text:style-name="Heading_20_5" text:outline-level="5">No Comments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11:37:08.107007217</meta:creation-date>
    <dc:date>2026-04-02T11:37:40.030862581</dc:date>
    <meta:editing-duration>PT32S</meta:editing-duration>
    <meta:editing-cycles>1</meta:editing-cycles>
    <meta:generator>LibreOffice/7.3.5.2$Linux_X86_64 LibreOffice_project/30$Build-2</meta:generator>
    <meta:document-statistic meta:table-count="0" meta:image-count="0" meta:object-count="0" meta:page-count="5" meta:paragraph-count="181" meta:word-count="1125" meta:character-count="5773" meta:non-whitespace-character-count="4827"/>
  </office:meta>
</office:document-meta>
</file>